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Heading_20_1">
      <style:paragraph-properties fo:margin-top="0in" fo:margin-bottom="0in" loext:contextual-spacing="false" fo:line-height="100%" fo:text-align="center" style:justify-single-word="false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entury Gothic" style:font-name-asian="Century Gothic1" style:font-name-complex="Century Gothic1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6aa84f"/>
    </style:style>
    <style:style style:name="T4" style:family="text">
      <style:text-properties fo:color="#6aa84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93c47d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rect text:anchor-type="as-char" style:rel-width="100%" draw:z-index="0" draw:style-name="gr1" draw:text-style-name="P14" svg:width="0.0012in" svg:height="0.0213in"><text:p/></draw:rect></text:p>
      <text:p text:style-name="P13"><text:bookmark text:name="_regh2cxds044"/><text:span text:style-name="T2">Task #5 - Classification </text:span><draw:rect text:anchor-type="as-char" style:rel-width="100%" draw:z-index="1" draw:style-name="gr1" draw:text-style-name="P14" svg:width="0.0012in" svg:height="0.0213in"><text:p/></draw:rect></text:p>
      <text:p text:style-name="P2">Steps needed to complete the task:</text:p>
      <text:list xml:id="list1410926268" text:style-name="WWNum3">
        <text:list-item>
          <text:p text:style-name="P3"><text:span text:style-name="T3">(0.25p) </text:span>Converting the categorical to numeric features, and other <text:span text:style-name="T5">preprocessing</text:span> steps (such as filling missing values). </text:p>
        </text:list-item>
        <text:list-item>
          <text:p text:style-name="P3"><text:span text:style-name="T3">(0.75p)</text:span> Study the<text:span text:style-name="T5"> impact of filter feature selection for two classifiers </text:span>from the list below (different from decision trees), using the conclusions from task 3 homework 1. <text:s/></text:p>
        </text:list-item>
        <text:list-item>
          <text:p text:style-name="P3"><text:span text:style-name="T3">(1.5p) </text:span>Using <text:span text:style-name="T5">5-fold cross validation</text:span> (performed for each instantiation of the classifier’s hyperparameters)</text:p>
          <text:list>
            <text:list-item>
              <text:p text:style-name="P8">Splitting the dataset in 5 folds, in a stratified manner (considering the distribution of the values of the feature). </text:p>
            </text:list-item>
            <text:list-item>
              <text:p text:style-name="P8">Repeatedly training on 4 folds and collecting, each time, the predictions on the validation fold.</text:p>
            </text:list-item>
            <text:list-item>
              <text:p text:style-name="P8">Collect all predictions on the validation folds and compute the <text:span text:style-name="T5">accuracy</text:span>, the <text:span text:style-name="T5">F1 score</text:span> and the <text:span text:style-name="T5">confusion matrix</text:span> to make a decision.</text:p>
            </text:list-item>
            <text:list-item>
              <text:p text:style-name="P8">Report the final metrics on the <text:span text:style-name="T7">held-out test dataset</text:span>. </text:p>
            </text:list-item>
          </text:list>
        </text:list-item>
      </text:list>
      <text:p text:style-name="P2"><text:s text:c="8"/>For unbalanced classes, use when performing the cross validation a class balancing step for each combination of the training folds. The validation folds will not be modified. </text:p>
      <text:p text:style-name="P2"><text:s text:c="9"/>If the data has a temporal dimension instead of k-fold cross validation use a division based on sliding time windows.</text:p>
      <text:list xml:id="list103727813281173" text:continue-numbering="true" text:style-name="WWNum3">
        <text:list-item>
          <text:p text:style-name="P3"><text:span text:style-name="T8"><text:s/></text:span><text:span text:style-name="T3">(1p) </text:span>For each best version of each classifier, report on the test dataset: </text:p>
          <text:list>
            <text:list-item>
              <text:p text:style-name="P8">The <text:span text:style-name="T5">confusion matrix </text:span></text:p>
            </text:list-item>
            <text:list-item>
              <text:p text:style-name="P8">The<text:span text:style-name="T5"> accuracy</text:span>, the <text:span text:style-name="T5">precision</text:span>, the <text:span text:style-name="T5">recall</text:span>, the <text:span text:style-name="T5">F1 score</text:span> </text:p>
            </text:list-item>
            <text:list-item>
              <text:p text:style-name="P8">The <text:span text:style-name="T5">AUC</text:span> (Area under the ROC curve) score </text:p>
            </text:list-item>
            <text:list-item>
              <text:p text:style-name="P8">Plots with the <text:span text:style-name="T5">decision boundaries</text:span></text:p>
            </text:list-item>
          </text:list>
        </text:list-item>
        <text:list-item>
          <text:p text:style-name="P3"><text:span text:style-name="T3">(1p)</text:span> Propose and experiment with a <text:span text:style-name="T5">stacking</text:span> method. <text:s/></text:p>
        </text:list-item>
        <text:list-item>
          <text:p text:style-name="P3"><text:span text:style-name="T3">(0.5p)</text:span> At the end of all experiments draw <text:span text:style-name="T5">conclusions</text:span> concerning the performance of the algorithms </text:p>
        </text:list-item>
      </text:list>
      <text:p text:style-name="P2"/>
      <text:p text:style-name="P2">Use the following methods:</text:p>
      <text:p text:style-name="P2"/>
      <text:list xml:id="list1800405033" text:style-name="WWNum2">
        <text:list-item>
          <text:p text:style-name="P4"><text:span text:style-name="T8"><text:s/></text:span><text:span text:style-name="T3">(1p)</text:span><text:span text:style-name="T4"> </text:span><text:span text:style-name="T5">Decision trees</text:span></text:p>
          <text:list>
            <text:list-item>
              <text:p text:style-name="P9">Hyperparameter tuning (the impurity measure, the maximum depth of the tree, the number of features to consider when looking for the best split, …)</text:p>
            </text:list-item>
            <text:list-item>
              <text:p text:style-name="P9">Visualization of the trees </text:p>
            </text:list-item>
            <text:list-item>
              <text:p text:style-name="P9"><text:soft-page-break/>Comparative study of the <text:s/>selected features compared to the 3rd task from homework 1: “In view of a subsequent classification analysis, identify the variables that have predictive power for the target variable.”<text:span text:style-name="T9">)</text:span> </text:p>
            </text:list-item>
          </text:list>
        </text:list-item>
        <text:list-item>
          <text:p text:style-name="P4"><text:span text:style-name="T8"><text:s/></text:span><text:span text:style-name="T3">(1p) </text:span><text:span text:style-name="T5">kNN</text:span></text:p>
          <text:list>
            <text:list-item>
              <text:p text:style-name="P9">Impact of feature standardization (impact on the distance)</text:p>
            </text:list-item>
            <text:list-item>
              <text:p text:style-name="P9">Hyperparameter tuning (distance function, number of neighbors, weighted final score,...)</text:p>
            </text:list-item>
          </text:list>
        </text:list-item>
        <text:list-item>
          <text:p text:style-name="P4"><text:span text:style-name="T8"><text:s/></text:span><text:span text:style-name="T3">(0.5p) </text:span><text:span text:style-name="T5">Naive Bayes</text:span> (for numerical features)</text:p>
          <text:list>
            <text:list-item>
              <text:p text:style-name="P9">Hyperparameter tuning</text:p>
            </text:list-item>
          </text:list>
        </text:list-item>
        <text:list-item>
          <text:p text:style-name="P4"><text:span text:style-name="T8"><text:s/></text:span><text:span text:style-name="T3">(0.5p)</text:span><text:span text:style-name="T5"> SVM</text:span> </text:p>
          <text:list>
            <text:list-item>
              <text:p text:style-name="P9">Impact of feature standardization </text:p>
            </text:list-item>
            <text:list-item>
              <text:p text:style-name="P9">Hyperparameter tuning (kernel function, numerical parameters)</text:p>
            </text:list-item>
          </text:list>
        </text:list-item>
        <text:list-item>
          <text:p text:style-name="P4"><text:span text:style-name="T8"><text:s/></text:span><text:span text:style-name="T3">(1p) </text:span><text:span text:style-name="T5">Neural networks </text:span></text:p>
          <text:list>
            <text:list-item>
              <text:p text:style-name="P9">Optimizing the architecture (number of layers, neurons per layer, activation functions)</text:p>
            </text:list-item>
            <text:list-item>
              <text:p text:style-name="P9">Optimizing the hyper-parameters (learning rate, training algorithm)</text:p>
            </text:list-item>
            <text:list-item>
              <text:p text:style-name="P9">Impact of feature standardization </text:p>
            </text:list-item>
          </text:list>
        </text:list-item>
        <text:list-item>
          <text:p text:style-name="P4"><text:span text:style-name="T8"><text:s/></text:span><text:span text:style-name="T3">(1p) </text:span><text:span text:style-name="T5">Ensemble strategies </text:span></text:p>
          <text:list>
            <text:list-item>
              <text:p text:style-name="P9"><text:span text:style-name="T3">(0.5p) </text:span>Bagging: Random forest, with hyper-parameter tuning</text:p>
            </text:list-item>
            <text:list-item>
              <text:p text:style-name="P9"><text:span text:style-name="T3">(0.5p) </text:span>Boosting: xgBoost with hyper-parameter tuning</text:p>
            </text:list-item>
          </text:list>
        </text:list-item>
      </text:list>
      <text:p text:style-name="P2"><text:s/></text:p>
      <text:p text:style-name="P2"/>
      <text:p text:style-name="P10"/>
      <text:p text:style-name="P1">References</text:p>
      <text:list xml:id="list3996234801" text:style-name="WWNum1">
        <text:list-item>
          <text:p text:style-name="P5"><text:a xlink:type="simple" xlink:href="https://people.csail.mit.edu/sanmay/papers/icml01.pdf" text:style-name="ListLabel_20_28" text:visited-style-name="ListLabel_20_28"><text:span text:style-name="T10">Filters, Wrappers and a Boosting-Based Hybrid for Feature Selection</text:span></text:a> <text:s/></text:p>
        </text:list-item>
        <text:list-item>
          <text:p text:style-name="P5"><text:a xlink:type="simple" xlink:href="https://web.mit.edu/6.034/wwwbob/svm.pdf" text:style-name="ListLabel_20_28" text:visited-style-name="ListLabel_20_28"><text:span text:style-name="T10">SVM MIT tutorial</text:span></text:a></text:p>
        </text:list-item>
        <text:list-item>
          <text:p text:style-name="P5"><text:a xlink:type="simple" xlink:href="https://web.stanford.edu/class/cme250/files/cme250_lecture6.pdf" text:style-name="ListLabel_20_28" text:visited-style-name="ListLabel_20_28"><text:span text:style-name="T10">Random Forest </text:span></text:a></text:p>
        </text:list-item>
        <text:list-item>
          <text:p text:style-name="P6"><text:a xlink:type="simple" xlink:href="https://dmlc.cs.washington.edu/data/pdf/XGBoostArxiv.pdf" text:style-name="ListLabel_20_28" text:visited-style-name="ListLabel_20_28"><text:span text:style-name="T10">XgBoost </text:span></text:a></text:p>
        </text:list-item>
        <text:list-item>
          <text:p text:style-name="P7">Chapter 5 from Data Mining - Practical Machine Learning Tools and Techniques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6" meta:word-count="453" meta:character-count="2895" meta:non-whitespace-character-count="2473"/>
    <meta:generator>LibreOfficeDev/6.0.5.2$Linux_X86_64 LibreOffice_project/</meta:generator>
  </office:meta>
</office:document-meta>
</file>